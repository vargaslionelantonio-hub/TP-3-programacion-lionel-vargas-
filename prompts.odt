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>
      <style:paragraph-properties fo:text-align="left"/>
      <style:text-properties style:font-name="Noto Sans Mono" fo:font-size="10pt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>
      <style:paragraph-properties fo:text-align="left"/>
      <style:text-properties style:text-line-through-style="none" style:text-line-through-type="none" style:font-name="Noto Sans Mono" fo:font-size="10pt" fo:font-style="normal" style:text-underline-style="non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3" form:id="control3"/>
          <form:textarea form:name="prompt-textare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 problema es que estás mezclando el <text:span text:style-name="Source_20_Text">switch</text:span> de <text:span text:style-name="Strong_20_Emphasis">prioridad</text:span> con condiciones sobre <text:span text:style-name="Strong_20_Emphasis">dia</text:span>.</text:p>
      <text:p text:style-name="Text_20_body">Estas líneas:</text:p>
      <text:section text:style-name="Sect1" text:name="code-block-viewer">
        <text:p text:style-name="P1"><text:span text:style-name="Source_20_Text">(dia &lt; 3);</text:span></text:p>
      </text:section>
      <text:section text:style-name="Sect1" text:name="Section1">
        <text:p text:style-name="P1"><text:bookmark text:name="code-block-viewer"/><text:span text:style-name="Source_20_Text">(dia = 3 &gt; 7);</text:span></text:p>
      </text:section>
      <text:section text:style-name="Sect1" text:name="Section2">
        <text:p text:style-name="P1"><text:bookmark text:name="code-block-viewer Copy 1"/><text:span text:style-name="Source_20_Text">(dia &gt; 7);</text:span></text:p>
      </text:section>
      <text:p text:style-name="Text_20_body"><text:span text:style-name="Strong_20_Emphasis">No hacen nada</text:span>. Son expresiones sueltas que JavaScript evalúa y descarta.</text:p>
      <text:p text:style-name="Text_20_body">Si querés que según los días muestre distintos mensajes, hacelo con un <text:span text:style-name="Source_20_Text">if</text:span> después de pedir los días:</text:p>
      <text:section text:style-name="Sect1" text:name="Section3">
        <text:p text:style-name="P2"><text:bookmark text:name="code-block-viewer Copy 2"/><text:span text:style-name="Source_20_Text">let nombredelequipo = prompt("Ingresa el nombre del equipo");</text:span></text:p>
        <text:p text:style-name="Preformatted_20_Text"><text:span text:style-name="Source_20_Text">let prioridad = prompt("Ingresa la prioridad del equipo\n1) alta\n2) media\n3) baja");</text:span></text:p>
        <text:p text:style-name="Preformatted_20_Text"><text:span text:style-name="Source_20_Text">let dia = 0;</text:span></text:p>
        <text:p text:style-name="Preformatted_20_Text"><text:span text:style-name="Source_20_Text">switch (prioridad) {</text:span></text:p>
        <text:p text:style-name="Preformatted_20_Text"><text:span text:style-name="Source_20_Text"><text:s text:c="4"/>case "1":</text:span></text:p>
        <text:p text:style-name="Preformatted_20_Text"><text:span text:style-name="Source_20_Text"><text:s text:c="8"/>alert("El equipo " + nombredelequipo + " tiene prioridad alta");</text:span></text:p>
        <text:p text:style-name="Preformatted_20_Text"><text:span text:style-name="Source_20_Text"><text:s text:c="8"/>dia = Number(prompt("Días transcurridos desde que se reportó el problema"));</text:span></text:p>
        <text:p text:style-name="Preformatted_20_Text"><text:span text:style-name="Source_20_Text"><text:s text:c="8"/>if (dia &lt; 3) {</text:span></text:p>
        <text:p text:style-name="Preformatted_20_Text"><text:span text:style-name="Source_20_Text"><text:s text:c="12"/>alert("Seguimiento normal");</text:span></text:p>
        <text:p text:style-name="Preformatted_20_Text"><text:span text:style-name="Source_20_Text"><text:s text:c="8"/>} else if (dia &gt;= 3 &amp;&amp; dia &lt;= 7) {</text:span></text:p>
        <text:p text:style-name="Preformatted_20_Text"><text:span text:style-name="Source_20_Text"><text:s text:c="12"/>alert("Realizar control del estado de la tarea");</text:span></text:p>
        <text:p text:style-name="Preformatted_20_Text"><text:span text:style-name="Source_20_Text"><text:s text:c="8"/>} else {</text:span></text:p>
        <text:p text:style-name="Preformatted_20_Text"><text:span text:style-name="Source_20_Text"><text:s text:c="12"/>alert("Generar alerta por demora"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4"/>case "2":</text:span></text:p>
        <text:p text:style-name="Preformatted_20_Text"><text:span text:style-name="Source_20_Text"><text:s text:c="8"/>alert("El equipo " + nombredelequipo + " tiene prioridad media"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4"/>case "3":</text:span></text:p>
        <text:p text:style-name="Preformatted_20_Text"><text:span text:style-name="Source_20_Text"><text:s text:c="8"/>alert("El equipo " + nombredelequipo + " tiene prioridad baja"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4"/>default:</text:span></text:p>
        <text:p text:style-name="Preformatted_20_Text"><text:span text:style-name="Source_20_Text"><text:s text:c="8"/>alert("El número que elegiste no es válido");</text:span></text:p>
        <text:p text:style-name="P3"><text:span text:style-name="Source_20_Text">}</text:span></text:p>
      </text:section>
      <text:p text:style-name="Text_20_body">Además, dentro de <text:span text:style-name="Source_20_Text">case "1"</text:span> no hace falta poner:</text:p>
      <text:section text:style-name="Sect1" text:name="Section4">
        <text:p text:style-name="P1"><text:bookmark text:name="code-block-viewer Copy 3"/><text:span text:style-name="Source_20_Text">if (prioridad == "1")</text:span></text:p>
      </text:section>
      <text:p text:style-name="Text_20_body">porque si llegaste a <text:span text:style-name="Source_20_Text">case "1"</text:span>, ya sabés que la prioridad es <text:span text:style-name="Source_20_Text">"1"</text:span>.</text:p>
      <text:p text:style-name="Text_20_body">&lt;!DOCTYPE html&gt; &lt;html lang="en"&gt; &lt;head&gt; &lt;meta charset="UTF-8"&gt; &lt;meta name="viewport" content="width=device-width, initial-scale=1.0"&gt; &lt;title&gt;Document&lt;/title&gt; &lt;/head&gt; &lt;body&gt; &lt;script&gt; let nombredelequipo = <text:soft-page-break/>prompt("ingresa el nombre del equipo"); let dia = 0 switch ("nombredelequipo"){ case "nombredelequipo": let prioridad = prompt("ingresa la prioridad del equipo \n 1) alta \n 2) media \n 3) baja"); if (prioridad == "1"){ alert("El equipo " + nombredelequipo + " tiene prioridad alta"); dia = prompt("Días transcurridos desde que se reportó el problema"); } else if (prioridad == "2"){ alert("El equipo " + nombredelequipo + " tiene prioridad media"); dia = prompt("Días transcurridos desde que se reportó el problema"); }else{ (prioridad == "3"); alert("El equipo " + nombredelequipo + " tiene prioridad baja"); dia = prompt("Días transcurridos desde que se reportó el problema"); } case 2: (dia &lt; 3); alert("Seguimiento normal"); case 3: (dia = 3 &gt; 7); alert("Realizar control del estado de la tarea"); case 4: (dia &gt; 7); alert("Generar alerta por demora"); default: alert("el numero que elegiste no es valido") } &lt;/script&gt; &lt;/body&gt; &lt;/html&gt;</text:p>
      <text:p text:style-name="Text_20_body">Ahora hay varios errores de lógica:</text:p>
      <text:h text:style-name="Heading_20_3" text:outline-level="3">1. Estás haciendo switch sobre un texto fijo</text:h>
      <text:section text:style-name="Sect1" text:name="Section5">
        <text:p text:style-name="P1"><text:bookmark text:name="code-block-viewer Copy 4"/><text:span text:style-name="Source_20_Text">switch ("nombredelequipo")</text:span></text:p>
      </text:section>
      <text:p text:style-name="Text_20_body">Eso siempre vale literalmente <text:span text:style-name="Source_20_Text">"nombredelequipo"</text:span>.</text:p>
      <text:p text:style-name="Text_20_body">Si querés usar la variable:</text:p>
      <text:section text:style-name="Sect1" text:name="Section6">
        <text:p text:style-name="P1"><text:bookmark text:name="code-block-viewer Copy 5"/><text:span text:style-name="Source_20_Text">switch (nombredelequipo)</text:span></text:p>
      </text:section>
      <text:p text:style-name="Text_20_body">Pero en realidad acá <text:span text:style-name="Strong_20_Emphasis">no necesitás ningún switch</text:span>.</text:p>
      <text:p text:style-name="Horizontal_20_Line"/>
      <text:h text:style-name="Heading_20_3" text:outline-level="3">2. Los casos 2, 3 y 4 nunca se van a ejecutar</text:h>
      <text:section text:style-name="Sect1" text:name="Section7">
        <text:p text:style-name="P2"><text:bookmark text:name="code-block-viewer Copy 6"/><text:span text:style-name="Source_20_Text">case 2:</text:span></text:p>
        <text:p text:style-name="Preformatted_20_Text"><text:span text:style-name="Source_20_Text">case 3:</text:span></text:p>
        <text:p text:style-name="P3"><text:span text:style-name="Source_20_Text">case 4:</text:span></text:p>
      </text:section>
      <text:p text:style-name="Text_20_body">Porque el <text:span text:style-name="Source_20_Text">switch</text:span> está comparando cadenas (<text:span text:style-name="Source_20_Text">"nombredelequipo"</text:span>), no números.</text:p>
      <text:p text:style-name="Horizontal_20_Line"/>
      <text:h text:style-name="Heading_20_3" text:outline-level="3">3. Estas condiciones no hacen nada</text:h>
      <text:section text:style-name="Sect1" text:name="Section8">
        <text:p text:style-name="P1"><text:bookmark text:name="code-block-viewer Copy 7"/><text:span text:style-name="Source_20_Text">(dia &lt; 3);</text:span></text:p>
      </text:section>
      <text:section text:style-name="Sect1" text:name="Section9">
        <text:p text:style-name="P1"><text:bookmark text:name="code-block-viewer Copy 8"/><text:span text:style-name="Source_20_Text">(dia = 3 &gt; 7);</text:span></text:p>
      </text:section>
      <text:section text:style-name="Sect1" text:name="Section10">
        <text:p text:style-name="P1"><text:bookmark text:name="code-block-viewer Copy 9"/><text:span text:style-name="Source_20_Text">(dia &gt; 7);</text:span></text:p>
      </text:section>
      <text:p text:style-name="Text_20_body">Para evaluar una condición necesitás <text:span text:style-name="Source_20_Text">if</text:span>.</text:p>
      <text:p text:style-name="Horizontal_20_Line"><text:soft-page-break/></text:p>
      <text:h text:style-name="Heading_20_3" text:outline-level="3">Lo que parece que querés hacer</text:h>
      <text:list text:style-name="L1">
        <text:list-item>
          <text:p text:style-name="P4">Pedir nombre. </text:p>
        </text:list-item>
        <text:list-item>
          <text:p text:style-name="P4">Pedir prioridad. </text:p>
        </text:list-item>
        <text:list-item>
          <text:p text:style-name="P4">Pedir días. </text:p>
        </text:list-item>
        <text:list-item>
          <text:p text:style-name="P5">Mostrar un mensaje según los días. </text:p>
        </text:list-item>
      </text:list>
      <text:p text:style-name="Text_20_body">Entonces no uses <text:span text:style-name="Source_20_Text">switch</text:span> para los días:</text:p>
      <text:section text:style-name="Sect1" text:name="Section11">
        <text:p text:style-name="P2"><text:bookmark text:name="code-block-viewer Copy 10"/><text:span text:style-name="Source_20_Text">let nombredelequipo = prompt("Ingresa el nombre del equipo");</text:span></text:p>
        <text:p text:style-name="Preformatted_20_Text"><text:span text:style-name="Source_20_Text">let prioridad = prompt("Ingresa la prioridad del equipo\n1) alta\n2) media\n3) baja");</text:span></text:p>
        <text:p text:style-name="Preformatted_20_Text"><text:span text:style-name="Source_20_Text">if (prioridad == "1") {</text:span></text:p>
        <text:p text:style-name="Preformatted_20_Text"><text:span text:style-name="Source_20_Text"><text:s text:c="4"/>alert("El equipo " + nombredelequipo + " tiene prioridad alta");</text:span></text:p>
        <text:p text:style-name="Preformatted_20_Text"><text:span text:style-name="Source_20_Text">} else if (prioridad == "2") {</text:span></text:p>
        <text:p text:style-name="Preformatted_20_Text"><text:span text:style-name="Source_20_Text"><text:s text:c="4"/>alert("El equipo " + nombredelequipo + " tiene prioridad media");</text:span></text:p>
        <text:p text:style-name="Preformatted_20_Text"><text:span text:style-name="Source_20_Text">} else if (prioridad == "3") {</text:span></text:p>
        <text:p text:style-name="Preformatted_20_Text"><text:span text:style-name="Source_20_Text"><text:s text:c="4"/>alert("El equipo " + nombredelequipo + " tiene prioridad baja");</text:span></text:p>
        <text:p text:style-name="Preformatted_20_Text"><text:span text:style-name="Source_20_Text">}</text:span></text:p>
        <text:p text:style-name="Preformatted_20_Text"><text:span text:style-name="Source_20_Text">let dia = Number(prompt("Días transcurridos desde que se reportó el problema"));</text:span></text:p>
        <text:p text:style-name="Preformatted_20_Text"><text:span text:style-name="Source_20_Text">if (dia &lt; 3) {</text:span></text:p>
        <text:p text:style-name="Preformatted_20_Text"><text:span text:style-name="Source_20_Text"><text:s text:c="4"/>alert("Seguimiento normal");</text:span></text:p>
        <text:p text:style-name="Preformatted_20_Text"><text:span text:style-name="Source_20_Text">} else if (dia &lt;= 7) {</text:span></text:p>
        <text:p text:style-name="Preformatted_20_Text"><text:span text:style-name="Source_20_Text"><text:s text:c="4"/>alert("Realizar control del estado de la tarea");</text:span></text:p>
        <text:p text:style-name="Preformatted_20_Text"><text:span text:style-name="Source_20_Text">} else {</text:span></text:p>
        <text:p text:style-name="Preformatted_20_Text"><text:span text:style-name="Source_20_Text"><text:s text:c="4"/>alert("Generar alerta por demora");</text:span></text:p>
        <text:p text:style-name="P3"><text:span text:style-name="Source_20_Text">}</text:span></text:p>
      </text:section>
      <text:p text:style-name="Text_20_body">Si esto es para una tarea de programación con <text:span text:style-name="Source_20_Text">switch</text:span>, pasame el enunciado completo y te lo adapto usando <text:span text:style-name="Source_20_Text">switch</text:span> correctamente.</text:p>
      <text:p text:style-name="Text_20_body">En JavaScript, para hacer un salto de línea dentro de un texto se usa <text:span text:style-name="Source_20_Text">\n</text:span> (barra invertida + n), no <text:span text:style-name="Source_20_Text">/n</text:span>.</text:p>
      <text:p text:style-name="Text_20_body">Ejemplo:</text:p>
      <text:section text:style-name="Sect1" text:name="Section12">
        <text:p text:style-name="P2"><text:bookmark text:name="code-block-viewer Copy 11"/><text:span text:style-name="Source_20_Text">let dialogo = "Hola\n¿Cómo estás?\nBienvenido al juego.";</text:span></text:p>
        <text:p text:style-name="P3"><text:span text:style-name="Source_20_Text">console.log(dialogo);</text:span></text:p>
      </text:section>
      <text:p text:style-name="Text_20_body">Salida:</text:p>
      <text:section text:style-name="Sect1" text:name="Section13">
        <text:p text:style-name="P2"><text:bookmark text:name="code-block-viewer Copy 12"/><text:span text:style-name="Source_20_Text">Hola</text:span></text:p>
        <text:p text:style-name="Preformatted_20_Text"><text:span text:style-name="Source_20_Text">¿Cómo estás?</text:span></text:p>
        <text:p text:style-name="P3"><text:span text:style-name="Source_20_Text">Bienvenido al juego.</text:span></text:p>
      </text:section>
      <text:p text:style-name="Text_20_body">Si querés <text:span text:style-name="Strong_20_Emphasis">separar un texto por los saltos de línea</text:span>, podés usar <text:span text:style-name="Source_20_Text">split("\n")</text:span>:</text:p>
      <text:section text:style-name="Sect1" text:name="Section14">
        <text:p text:style-name="P2"><text:bookmark text:name="code-block-viewer Copy 13"/><text:span text:style-name="Source_20_Text">let dialogo = "Hola\n¿Cómo estás?\nBienvenido al juego.";</text:span></text:p>
        <text:p text:style-name="Preformatted_20_Text"><text:span text:style-name="Source_20_Text">let lineas = dialogo.split("\n");</text:span></text:p>
        <text:p text:style-name="P3"><text:span text:style-name="Source_20_Text">console.log(lineas);</text:span></text:p>
      </text:section>
      <text:p text:style-name="Text_20_body"><text:soft-page-break/>Resultado:</text:p>
      <text:section text:style-name="Sect1" text:name="Section15">
        <text:p text:style-name="P1"><text:bookmark text:name="code-block-viewer Copy 14"/><text:span text:style-name="Source_20_Text">["Hola", "¿Cómo estás?", "Bienvenido al juego."]</text:span></text:p>
      </text:section>
      <text:p text:style-name="Text_20_body">Si estás haciendo un sistema de diálogos para un juego, contame cómo guardás los diálogos y te muestro la forma más conveniente de separarlos.</text:p>
      <text:section text:style-name="Sect2" text:name="thread-bottom-container">
        <text:p text:style-name="P6"/>
        <text:section text:style-name="Sect2" text:name="thread-bottom">
          <text:p text:style-name="P7"><text:bookmark text:name="upload-files"/><draw:control text:anchor-type="as-char" draw:z-index="0" draw:name="Shape1" draw:style-name="gr1" draw:text-style-name="P8" svg:width="4.34cm" svg:height="0.609cm" draw:control="control1"/></text:p>
          <text:p text:style-name="P9"><draw:control text:anchor-type="as-char" draw:z-index="1" draw:name="Shape2" draw:style-name="gr2" draw:text-style-name="P10" svg:width="4.181cm" svg:height="0.874cm" draw:control="control2"/></text:p>
          <text:section text:style-name="Sect2" text:name="prompt-textarea">
            <text:p text:style-name="P6"/>
          </text:section>
          <text:section text:style-name="Sect2" text:name="_r_ft_">
            <text:p text:style-name="P7"/>
          </text:section>
          <text:section text:style-name="Sect2" text:name="_r_fu_">
            <text:p text:style-name="P7"/>
          </text:section>
        </text:section>
      </text:section>
      <text:p text:style-name="P11">Por qué no imprime la alerta</text:p>
      <text:section text:style-name="Sect2" text:name="thread">
        <text:p text:style-name="Standard"/>
        <text:p text:style-name="P12">Por que no me funciona</text:p>
        <text:p text:style-name="Text_20_body">Por la foto veo dos errores principales:</text:p>
        <text:h text:style-name="Heading_20_3" text:outline-level="3">1. <text:span text:style-name="Source_20_Text">prompt()</text:span> devuelve texto, no números</text:h>
        <text:p text:style-name="Text_20_body">Cuando escribís:</text:p>
        <text:section text:style-name="Sect1" text:name="Section16">
          <text:p text:style-name="P2"><text:bookmark text:name="code-block-viewer Copy 15"/><text:span text:style-name="Source_20_Text">switch (prioridad) {</text:span></text:p>
          <text:p text:style-name="P3"><text:span text:style-name="Source_20_Text"><text:s text:c="4"/>case 1:</text:span></text:p>
        </text:section>
        <text:p text:style-name="Text_20_body"><text:span text:style-name="Source_20_Text">prioridad</text:span> vale <text:span text:style-name="Source_20_Text">"1"</text:span> (texto), no <text:span text:style-name="Source_20_Text">1</text:span> (número), por lo que nunca entra en ningún <text:span text:style-name="Source_20_Text">case</text:span>.</text:p>
        <text:p text:style-name="Text_20_body">Cambiá los casos a:</text:p>
        <text:section text:style-name="Sect1" text:name="Section17">
          <text:p text:style-name="P2"><text:bookmark text:name="code-block-viewer Copy 16"/><text:span text:style-name="Source_20_Text">case "1":</text:span></text:p>
          <text:p text:style-name="Preformatted_20_Text"><text:span text:style-name="Source_20_Text">case "2":</text:span></text:p>
          <text:p text:style-name="P3"><text:span text:style-name="Source_20_Text">case "3":</text:span></text:p>
        </text:section>
        <text:p text:style-name="Text_20_body">o convertí la entrada a número:</text:p>
        <text:section text:style-name="Sect1" text:name="Section18">
          <text:p text:style-name="P1"><text:bookmark text:name="code-block-viewer Copy 17"/><text:span text:style-name="Source_20_Text">let prioridad = Number(prompt("Ingresa la prioridad del equipo..."));</text:span></text:p>
        </text:section>
        <text:h text:style-name="Heading_20_3" text:outline-level="3">2. El segundo <text:span text:style-name="Source_20_Text">prompt</text:span> parece estar incompleto</text:h>
        <text:p text:style-name="Text_20_body">En la foto se ve:</text:p>
        <text:section text:style-name="Sect1" text:name="Section19">
          <text:p text:style-name="P1"><text:bookmark text:name="code-block-viewer Copy 18"/><text:span text:style-name="Source_20_Text">let prioridad = prompt("ingresa la prioridad del equipo \n 1) alta \n 2)</text:span></text:p>
        </text:section>
        <text:p text:style-name="Text_20_body">Parece que falta terminar el texto, las comillas y el paréntesis. Debería ser algo así:</text:p>
        <text:section text:style-name="Sect1" text:name="Section20">
          <text:p text:style-name="P1"><text:bookmark text:name="code-block-viewer Copy 19"/><text:span text:style-name="Source_20_Text">let prioridad = prompt("Ingresa la prioridad del equipo\n1) Alta\n2) Media\n3) Baja");</text:span></text:p>
        </text:section>
        <text:h text:style-name="Heading_20_3" text:outline-level="3"><text:soft-page-break/>Código corregido</text:h>
        <text:section text:style-name="Sect1" text:name="Section21">
          <text:p text:style-name="P2"><text:bookmark text:name="code-block-viewer Copy 20"/><text:span text:style-name="Source_20_Text">let nombredelequipo = prompt("Ingresa el nombre del equipo");</text:span></text:p>
          <text:p text:style-name="Preformatted_20_Text"><text:span text:style-name="Source_20_Text">let prioridad = prompt("Ingresa la prioridad del equipo\n1) Alta\n2) Media\n3) Baja");</text:span></text:p>
          <text:p text:style-name="Preformatted_20_Text"><text:span text:style-name="Source_20_Text">switch (prioridad) {</text:span></text:p>
          <text:p text:style-name="Preformatted_20_Text"><text:span text:style-name="Source_20_Text"><text:s text:c="4"/>case "1":</text:span></text:p>
          <text:p text:style-name="Preformatted_20_Text"><text:span text:style-name="Source_20_Text"><text:s text:c="8"/>alert("El equipo " + nombredelequipo + " tiene prioridad alt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case "2":</text:span></text:p>
          <text:p text:style-name="Preformatted_20_Text"><text:span text:style-name="Source_20_Text"><text:s text:c="8"/>alert("El equipo " + nombredelequipo + " tiene prioridad medi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case "3":</text:span></text:p>
          <text:p text:style-name="Preformatted_20_Text"><text:span text:style-name="Source_20_Text"><text:s text:c="8"/>alert("El equipo " + nombredelequipo + " tiene prioridad baj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default:</text:span></text:p>
          <text:p text:style-name="Preformatted_20_Text"><text:span text:style-name="Source_20_Text"><text:s text:c="8"/>alert("El número que elegiste no es válido");</text:span></text:p>
          <text:p text:style-name="P3"><text:span text:style-name="Source_20_Text">}</text:span></text:p>
        </text:section>
        <text:p text:style-name="Text_20_body">Si sigue sin funcionar, mandame una captura donde se vea <text:span text:style-name="Strong_20_Emphasis">el error de la consola (F12 → Console)</text:span> o copiame el código completo.</text:p>
        <text:p text:style-name="Text_20_body">Como hago que un else salte al case 2</text:p>
        <text:p text:style-name="Text_20_body">No podés hacer que un <text:span text:style-name="Source_20_Text">else</text:span> "salte" directamente a un <text:span text:style-name="Source_20_Text">case</text:span> de un <text:span text:style-name="Source_20_Text">switch</text:span>. Pero podés lograr el mismo efecto de varias formas.</text:p>
        <text:p text:style-name="Text_20_body">Por ejemplo:</text:p>
        <text:section text:style-name="Sect1" text:name="Section22">
          <text:p text:style-name="P2"><text:bookmark text:name="code-block-viewer Copy 21"/><text:span text:style-name="Source_20_Text">if (prioridad == "") {</text:span></text:p>
          <text:p text:style-name="Preformatted_20_Text"><text:span text:style-name="Source_20_Text"><text:s text:c="4"/>prioridad = "2";</text:span></text:p>
          <text:p text:style-name="Preformatted_20_Text"><text:span text:style-name="Source_20_Text">}</text:span></text:p>
          <text:p text:style-name="Preformatted_20_Text"><text:span text:style-name="Source_20_Text">switch (prioridad) {</text:span></text:p>
          <text:p text:style-name="Preformatted_20_Text"><text:span text:style-name="Source_20_Text"><text:s text:c="4"/>case "1":</text:span></text:p>
          <text:p text:style-name="Preformatted_20_Text"><text:span text:style-name="Source_20_Text"><text:s text:c="8"/>alert("Alt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case "2":</text:span></text:p>
          <text:p text:style-name="Preformatted_20_Text"><text:span text:style-name="Source_20_Text"><text:s text:c="8"/>alert("Medi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case "3":</text:span></text:p>
          <text:p text:style-name="Preformatted_20_Text"><text:span text:style-name="Source_20_Text"><text:s text:c="8"/>alert("Baja");</text:span></text:p>
          <text:p text:style-name="Preformatted_20_Text"><text:span text:style-name="Source_20_Text"><text:s text:c="8"/>break;</text:span></text:p>
          <text:p text:style-name="P3"><text:span text:style-name="Source_20_Text">}</text:span></text:p>
        </text:section>
        <text:p text:style-name="Text_20_body">O usando un <text:span text:style-name="Source_20_Text">switch</text:span> y dejando que el <text:span text:style-name="Source_20_Text">default</text:span> haga lo mismo que el <text:span text:style-name="Source_20_Text">case "2"</text:span>:</text:p>
        <text:section text:style-name="Sect1" text:name="Section23">
          <text:p text:style-name="P2"><text:bookmark text:name="code-block-viewer Copy 22"/><text:span text:style-name="Source_20_Text">switch (prioridad) {</text:span></text:p>
          <text:p text:style-name="Preformatted_20_Text"><text:span text:style-name="Source_20_Text"><text:s text:c="4"/>case "1":</text:span></text:p>
          <text:p text:style-name="Preformatted_20_Text"><text:span text:style-name="Source_20_Text"><text:s text:c="8"/>alert("Alta");</text:span></text:p>
          <text:p text:style-name="Preformatted_20_Text"><text:span text:style-name="Source_20_Text"><text:s text:c="8"/>break;</text:span></text:p>
          <text:p text:style-name="Preformatted_20_Text"><text:span text:style-name="Source_20_Text"><text:s text:c="4"/>case "2":</text:span></text:p>
          <text:p text:style-name="Preformatted_20_Text"><text:span text:style-name="Source_20_Text"><text:s text:c="4"/>default:</text:span></text:p>
          <text:p text:style-name="Preformatted_20_Text"><text:span text:style-name="Source_20_Text"><text:s text:c="8"/>alert("Media");</text:span></text:p>
          <text:p text:style-name="Preformatted_20_Text"><text:soft-page-break/><text:span text:style-name="Source_20_Text"><text:s text:c="8"/>break;</text:span></text:p>
          <text:p text:style-name="Preformatted_20_Text"><text:span text:style-name="Source_20_Text"><text:s text:c="4"/>case "3":</text:span></text:p>
          <text:p text:style-name="Preformatted_20_Text"><text:span text:style-name="Source_20_Text"><text:s text:c="8"/>alert("Baja");</text:span></text:p>
          <text:p text:style-name="Preformatted_20_Text"><text:span text:style-name="Source_20_Text"><text:s text:c="8"/>break;</text:span></text:p>
          <text:p text:style-name="P3"><text:span text:style-name="Source_20_Text">}</text:span></text:p>
        </text:section>
        <text:p text:style-name="Text_20_body">Si me mostrás el código exacto donde querés usar el <text:span text:style-name="Source_20_Text">else</text:span>, te digo la forma más adecuada.</text:p>
        <text:p text:style-name="P9"/>
        <text:p text:style-name="Text_20_body">Cual es el error </text:p>
        <text:p text:style-name="Text_20_body">Veo varios errores de sintaxis en ese código:</text:p>
        <text:h text:style-name="Heading_20_3" text:outline-level="3">1. <text:span text:style-name="Source_20_Text">dias</text:span> y <text:span text:style-name="Source_20_Text">dia</text:span></text:h>
        <text:p text:style-name="Text_20_body">Declaraste:</text:p>
        <text:section text:style-name="Sect1" text:name="Section24">
          <text:p text:style-name="P1"><text:bookmark text:name="code-block-viewer Copy 23"/><text:span text:style-name="Source_20_Text">let dia = 0</text:span></text:p>
        </text:section>
        <text:p text:style-name="Text_20_body">pero después usás:</text:p>
        <text:section text:style-name="Sect1" text:name="Section25">
          <text:p text:style-name="P1"><text:bookmark text:name="code-block-viewer Copy 24"/><text:span text:style-name="Source_20_Text">if (dias == 3)</text:span></text:p>
        </text:section>
        <text:p text:style-name="Text_20_body">Debería ser siempre el mismo nombre:</text:p>
        <text:section text:style-name="Sect1" text:name="Section26">
          <text:p text:style-name="P1"><text:bookmark text:name="code-block-viewer Copy 25"/><text:span text:style-name="Source_20_Text">let dias = 0;</text:span></text:p>
        </text:section>
        <text:h text:style-name="Heading_20_3" text:outline-level="3">2. <text:span text:style-name="Source_20_Text">else if</text:span> está mal escrito</text:h>
        <text:p text:style-name="Text_20_body">Tenés algo parecido a:</text:p>
        <text:section text:style-name="Sect1" text:name="Section27">
          <text:p text:style-name="P2"><text:bookmark text:name="code-block-viewer Copy 26"/><text:span text:style-name="Source_20_Text">}else if{</text:span></text:p>
          <text:p text:style-name="P3"><text:span text:style-name="Source_20_Text"><text:s text:c="4"/>(dias == 3&lt;7);</text:span></text:p>
        </text:section>
        <text:p text:style-name="Text_20_body">Debe ser:</text:p>
        <text:section text:style-name="Sect1" text:name="Section28">
          <text:p text:style-name="P1"><text:bookmark text:name="code-block-viewer Copy 27"/><text:span text:style-name="Source_20_Text">} else if (dias &gt; 3 &amp;&amp; dias &lt; 7) {</text:span></text:p>
        </text:section>
        <text:h text:style-name="Heading_20_3" text:outline-level="3">3. El <text:span text:style-name="Source_20_Text">else</text:span> no lleva condición</text:h>
        <text:p text:style-name="Text_20_body">Tenés:</text:p>
        <text:section text:style-name="Sect1" text:name="Section29">
          <text:p text:style-name="P2"><text:bookmark text:name="code-block-viewer Copy 28"/><text:span text:style-name="Source_20_Text">}else{</text:span></text:p>
          <text:p text:style-name="P3"><text:span text:style-name="Source_20_Text"><text:s text:c="4"/>(dias == 7&gt;9999999999)</text:span></text:p>
        </text:section>
        <text:p text:style-name="Text_20_body">El <text:span text:style-name="Source_20_Text">else</text:span> debe ser simplemente:</text:p>
        <text:section text:style-name="Sect1" text:name="Section30">
          <text:p text:style-name="P1"><text:bookmark text:name="code-block-viewer Copy 29"/><text:span text:style-name="Source_20_Text">} else {</text:span></text:p>
        </text:section>
        <text:h text:style-name="Heading_20_3" text:outline-level="3"><text:soft-page-break/>4. Falta cerrar el <text:span text:style-name="Source_20_Text">case "1"</text:span> con <text:span text:style-name="Source_20_Text">break</text:span></text:h>
        <text:p text:style-name="Text_20_body">Antes de <text:span text:style-name="Source_20_Text">case "2"</text:span> debería haber:</text:p>
        <text:section text:style-name="Sect1" text:name="Section31">
          <text:p text:style-name="P1"><text:bookmark text:name="code-block-viewer Copy 30"/><text:span text:style-name="Source_20_Text">break;</text:span></text:p>
        </text:section>
        <text:h text:style-name="Heading_20_3" text:outline-level="3">5. Conviene convertir el <text:span text:style-name="Source_20_Text">prompt</text:span> a número</text:h>
        <text:section text:style-name="Sect1" text:name="Section32">
          <text:p text:style-name="P1"><text:bookmark text:name="code-block-viewer Copy 31"/><text:span text:style-name="Source_20_Text">dias = Number(prompt("Días transcurridos desde que se reportó el problema"));</text:span></text:p>
        </text:section>
        <text:h text:style-name="Heading_20_3" text:outline-level="3">Ejemplo corregido</text:h>
        <text:section text:style-name="Sect1" text:name="Section33">
          <text:p text:style-name="P2"><text:bookmark text:name="code-block-viewer Copy 32"/><text:span text:style-name="Source_20_Text">dias = Number(prompt("Días transcurridos desde que se reportó el problema"));</text:span></text:p>
          <text:p text:style-name="Preformatted_20_Text"><text:span text:style-name="Source_20_Text">if (dias == 3) {</text:span></text:p>
          <text:p text:style-name="Preformatted_20_Text"><text:span text:style-name="Source_20_Text"><text:s text:c="4"/>alert("Seguimiento normal");</text:span></text:p>
          <text:p text:style-name="Preformatted_20_Text"><text:span text:style-name="Source_20_Text">} else if (dias &gt; 3 &amp;&amp; dias &lt; 7) {</text:span></text:p>
          <text:p text:style-name="Preformatted_20_Text"><text:span text:style-name="Source_20_Text"><text:s text:c="4"/>alert("Requiere atención");</text:span></text:p>
          <text:p text:style-name="Preformatted_20_Text"><text:span text:style-name="Source_20_Text">} else {</text:span></text:p>
          <text:p text:style-name="Preformatted_20_Text"><text:span text:style-name="Source_20_Text"><text:s text:c="4"/>alert("Escalar el problema");</text:span></text:p>
          <text:p text:style-name="Preformatted_20_Text"><text:span text:style-name="Source_20_Text">}</text:span></text:p>
          <text:p text:style-name="P3"><text:span text:style-name="Source_20_Text">break;</text:span></text:p>
        </text:section>
        <text:p text:style-name="Text_20_body">Además, en la foto veo que VS Code te está marcando en rojo <text:span text:style-name="Source_20_Text">case "2":</text:span>, lo que suele ocurrir porque hay una llave <text:span text:style-name="Source_20_Text">}</text:span> o un bloque <text:span text:style-name="Source_20_Text">if/else</text:span> mal cerrado antes de llegar a ese <text:span text:style-name="Source_20_Text">case</text:span>.</text:p>
        <text:section text:style-name="Sect2" text:name="Section34">
          <text:p text:style-name="P6"><text:bookmark text:name="thread-bottom-container"/></text:p>
          <text:section text:style-name="Sect2" text:name="Section35">
            <text:p text:style-name="P7"><text:bookmark text:name="thread-bottom"/><text:bookmark text:name="upload-files Copy 1"/><draw:control text:anchor-type="as-char" draw:z-index="2" draw:name="Shape3" draw:style-name="gr1" draw:text-style-name="P8" svg:width="4.34cm" svg:height="0.609cm" draw:control="control3"/></text:p>
            <text:p text:style-name="P9"><draw:control text:anchor-type="as-char" draw:z-index="3" draw:name="Shape4" draw:style-name="gr2" draw:text-style-name="P10" svg:width="4.181cm" svg:height="0.874cm" draw:control="control4"/></text:p>
            <text:section text:style-name="Sect2" text:name="Section36">
              <text:p text:style-name="P6"><text:bookmark text:name="prompt-textarea"/></text:p>
            </text:section>
            <text:section text:style-name="Sect2" text:name="_r_gt_">
              <text:p text:style-name="P7"/>
            </text:section>
            <text:section text:style-name="Sect2" text:name="_r_gu_">
              <text:p text:style-name="P7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23:24:09.190010388</meta:creation-date>
    <dc:date>2026-06-14T23:26:22.831119043</dc:date>
    <meta:editing-duration>PT2M14S</meta:editing-duration>
    <meta:editing-cycles>1</meta:editing-cycles>
    <meta:document-statistic meta:table-count="0" meta:image-count="0" meta:object-count="0" meta:page-count="7" meta:paragraph-count="199" meta:word-count="1220" meta:character-count="7647" meta:non-whitespace-character-count="6225"/>
    <meta:generator>LibreOffice/26.2.3.2$Linux_X86_64 LibreOffice_project/620$Build-2</meta:generator>
  </office:meta>
</office:document-meta>
</file>